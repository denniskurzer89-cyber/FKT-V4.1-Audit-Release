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600D69A763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465cm" svg:height="27.699cm" svg:x="1.035cm" svg:y="1cm">
          <draw:image xlink:href="Pictures/100000000000040000000600D69A763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16T06:01:41.082544030</dc:date>
    <meta:editing-duration>PT4M56S</meta:editing-duration>
    <meta:editing-cycles>1</meta:editing-cycles>
    <meta:document-statistic meta:object-count="1"/>
    <meta:generator>LibreOffice/24.2.7.2$Linux_X86_64 LibreOffice_project/420$Build-2</meta:generator>
  </office:meta>
</office:document-meta>
</file>